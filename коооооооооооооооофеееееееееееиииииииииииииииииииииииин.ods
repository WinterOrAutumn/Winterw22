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1072" calcext:value-type="float">
            <text:p>1310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2144" calcext:value-type="float">
            <text:p>2621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4288" calcext:value-type="float">
            <text:p>5242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48576" calcext:value-type="float">
            <text:p>10485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94304" calcext:value-type="float">
            <text:p>41943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388608" calcext:value-type="float">
            <text:p>8388608</text:p>
          </table:table-cell>
        </table:table-row>
        <table:table-row table:style-name="ro1" table:number-rows-repeated="104855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Лист2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61" calcext:value-type="float">
            <text:p>65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683" calcext:value-type="float">
            <text:p>196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049" calcext:value-type="float">
            <text:p>590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7147" calcext:value-type="float">
            <text:p>1771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1441" calcext:value-type="float">
            <text:p>5314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94323" calcext:value-type="float">
            <text:p>15943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82969" calcext:value-type="float">
            <text:p>47829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48907" calcext:value-type="float">
            <text:p>143489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046721" calcext:value-type="float">
            <text:p>430467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9140163" calcext:value-type="float">
            <text:p>1291401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7420489" calcext:value-type="float">
            <text:p>3874204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62261467" calcext:value-type="float">
            <text:p>11622614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86784401" calcext:value-type="float">
            <text:p>34867844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460353203" calcext:value-type="float">
            <text:p>104603532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381059609" calcext:value-type="float">
            <text:p>313810596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4143178827" calcext:value-type="float">
            <text:p>94143178827</text:p>
          </table:table-cell>
        </table:table-row>
        <table:table-row table:style-name="ro1" table:number-rows-repeated="104855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Лист3" table:style-name="ta2">
        <table:table-column table:style-name="co1" table:number-columns-repeated="6" table:default-cell-style-name="Default"/>
        <table:table-row table:style-name="ro1"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5"/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Лист4" table:style-name="ta2">
        <table:table-column table:style-name="co1" table:default-cell-style-name="Default"/>
        <table:table-row table:style-name="ro2">
          <table:table-cell/>
        </table:table-row>
      </table:table>
      <table:table table:name="Лист5" table:style-name="ta2">
        <table:table-column table:style-name="co1" table:number-columns-repeated="8" table:default-cell-style-name="Default"/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table:style-name="ce1" office:value-type="string" calcext:value-type="string">
            <text:p>Колледж 1</text:p>
          </table:table-cell>
          <table:table-cell office:value-type="float" office:value="1510000" calcext:value-type="float">
            <text:p>151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Колледж 2</text:p>
          </table:table-cell>
          <table:table-cell office:value-type="float" office:value="237800" calcext:value-type="float">
            <text:p>2378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Колледж 3</text:p>
          </table:table-cell>
          <table:table-cell office:value-type="float" office:value="3211400" calcext:value-type="float">
            <text:p>32114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Колледж 4</text:p>
          </table:table-cell>
          <table:table-cell office:value-type="float" office:value="4961201" calcext:value-type="float">
            <text:p>4961201</text:p>
          </table:table-cell>
          <table:table-cell table:number-columns-repeated="6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.00.0000</text:date>, <text:time style:data-style-name="N2" text:time-value="13:21:43.45066832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4T13:21:43.661893786</meta:creation-date>
    <dc:title>Таблица</dc:title>
    <meta:generator>LibreOffice/7.6.7.2$Linux_X86_64 LibreOffice_project/60$Build-2</meta:generator>
    <meta:editing-duration>PT45M6S</meta:editing-duration>
    <meta:editing-cycles>5</meta:editing-cycles>
    <dc:date>2026-05-04T14:06:52.213397874</dc:date>
    <meta:document-statistic meta:table-count="5" meta:cell-count="135" meta:object-count="0"/>
    <meta:template xlink:type="simple" xlink:actuate="onRequest" xlink:title="Таблица" xlink:href="../../../../../usr/lib/libreoffice/share/template/common/ШАБЛОН_ЭЛЕКТРОННОЙ_ТАБЛИЦЫ_2019-07-22.ots" meta:date="2026-05-04T13:21:43.521118633"/>
  </office:meta>
</office:document-meta>
</file>